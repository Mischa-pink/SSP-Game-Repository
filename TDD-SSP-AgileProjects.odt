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" style:parent-style-name="Standaard" style:family="paragraph">
      <style:text-properties fo:language="en" fo:country="US"/>
    </style:style>
    <style:style style:name="P4" style:parent-style-name="Standa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" style:parent-style-name="Standaard" style:family="paragraph">
      <style:text-properties fo:font-size="14pt" style:font-size-asian="14pt" style:font-size-complex="14pt" fo:language="en" fo:country="US"/>
    </style:style>
    <style:style style:name="P6" style:parent-style-name="Standaard" style:family="paragraph">
      <style:text-properties fo:font-size="14pt" style:font-size-asian="14pt" style:font-size-complex="14pt" fo:language="en" fo:country="US"/>
    </style:style>
    <style:style style:name="P7" style:parent-style-name="Standa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" style:parent-style-name="Standaard" style:family="paragraph">
      <style:text-properties fo:font-size="14pt" style:font-size-asian="14pt" style:font-size-complex="14pt" fo:language="en" fo:country="US"/>
    </style:style>
    <style:style style:name="P9" style:parent-style-name="Standaard" style:family="paragraph">
      <style:text-properties fo:font-size="14pt" style:font-size-asian="14pt" style:font-size-complex="14pt" fo:language="en" fo:country="US"/>
    </style:style>
    <style:style style:name="P10" style:parent-style-name="Standa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" style:parent-style-name="Standaardalinea-lettertype" style:family="text">
      <style:text-properties fo:font-size="14pt" style:font-size-asian="14pt" style:font-size-complex="14pt" fo:language="en" fo:country="US"/>
    </style:style>
    <style:style style:name="T12" style:parent-style-name="Standaardalinea-lettertype" style:family="text">
      <style:text-properties fo:font-size="14pt" style:font-size-asian="14pt" style:font-size-complex="14pt" fo:language="en" fo:country="US"/>
    </style:style>
    <style:style style:name="T13" style:parent-style-name="Standaardalinea-lettertype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<text:span text:style-name="T2">TDD SSP game</text:span></text:p>
      <text:p text:style-name="P3"/>
      <text:p text:style-name="P4">Set up:</text:p>
      <text:p text:style-name="P5">Shared Unity project in the SSP organization</text:p>
      <text:p text:style-name="P6"/>
      <text:p text:style-name="P7">Folder Structure:</text:p>
      <text:p text:style-name="P8">In assed folder: Script Folder, Sprite Folder, Sound folder.</text:p>
      <text:p text:style-name="P9"/>
      <text:p text:style-name="P10">User Stories:</text:p>
      <text:p text:style-name="Standaard"><text:span text:style-name="T11">In<text:s/></text:span><text:span text:style-name="T12">GitHub</text:span><text:span text:style-name="T13"><text:s/>projects…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scha Koolen (68780)</meta:initial-creator>
    <dc:creator>Mischa Koolen (68780)</dc:creator>
    <meta:creation-date>2026-05-07T12:34:00Z</meta:creation-date>
    <dc:date>2026-05-13T07:24:00Z</dc:date>
    <meta:template xlink:href="Normal.dotm" xlink:type="simple"/>
    <meta:editing-cycles>5</meta:editing-cycles>
    <meta:editing-duration>PT1140S</meta:editing-duration>
    <meta:document-statistic meta:page-count="1" meta:paragraph-count="1" meta:word-count="27" meta:character-count="182" meta:row-count="1" meta:non-whitespace-character-count="156"/>
  </office:meta>
</office:document-meta>
</file>